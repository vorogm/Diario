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adornments="Negrita itálica"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c5479"/>
    </style:style>
    <style:style style:name="T2" style:family="text">
      <style:text-properties officeooo:rsid="001cf2ee"/>
    </style:style>
    <style:style style:name="T3" style:family="text">
      <style:text-properties officeooo:rsid="001db12a"/>
    </style:style>
    <style:style style:name="T4" style:family="text">
      <style:text-properties officeooo:rsid="001f979e"/>
    </style:style>
    <style:style style:name="T5" style:family="text">
      <style:text-properties officeooo:rsid="00217744"/>
    </style:style>
    <style:style style:name="T6" style:family="text">
      <style:text-properties officeooo:rsid="00236ade"/>
    </style:style>
    <style:style style:name="T7" style:family="text">
      <style:text-properties officeooo:rsid="002b37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iario_5f_fechas">Martes 26 Mayo 2026</text:p>
      <text:p text:style-name="Diario_5f_texto"/>
      <text:p text:style-name="Diario_5f_texto">Hace meses sino años, que no escribo en el diario. Hoy he decidido volver a escribir porque ayer tome una decisión importante. No sé si buena o mala.</text:p>
      <text:p text:style-name="Diario_5f_texto">Como ya sabeis, Yo estaba trabajando en ATC de MasMovil, que fue donde conoci a Delly. No se si lo dije, pero empecé a salir con ella, en diciembre del 2023 y desde entonces somos novios. No vivimos juntos, pero los fines de semana ella viene a mi casa. Bueno, en diciembre, creo, del 2024 me cambiaron a <text:span text:style-name="T1">Whatsapp de MasMovil y Yoigo. Ahí yo estaba superencantado, ya que no tenía que hablar con ningún cliente ni sobretodo escuchar. </text:span><text:span text:style-name="T2">Pero un año después, el departamento iba a desaparecer y nos intentaban cambiar a otro departamento. A mi me querían pasar a Energía, que lo bueno es que Delly estaba allí, y no se trabajaba ni findes ni festivos. Bueno, un sábado por la mañana cada 6 u 8 semanas. Pero también me dijeron de pasarme a Schindler. Un departamento de ascensores que acabada de empezar y necesitaban a gente que hablase Catalan. Ya que unos de los clientes eran de Andorra. </text:span><text:span text:style-name="T3">Bueno, se suponía que era un trabajo fácil y sencillo, y se pagaban horas nocturnas y desplazamiento. Lo malo es que el horario era de 16:00 a 0:00. Por lo que ya no podría cenar con Delly. Pero si me vino bien para caminar, porque comia a las 13:30 y antes de ir a trabajar, iba entre 20 y 40 minutos a caminar. El péndulo me dijo que mejor seleccionar Energía, aunque me dijo que más fácil Schindler. Pero como no me apetecía nada volver a coger llamadas una trasa otra, decidi no hacerle caso y elegir Schindler. Pero una vez allí me agobie, porque eran muchas cosas que se podían hacer, y aunque al día eran pocas llamadas, me agobiaba. Sobretodo por la manera de funcionar. Tenía que recoger la llamada y luego buscar al técnico y asignarle la cita. Y muchas veces era gente mayor o invalida. La cuestión es que estuve a punto de dejarlo. Le envíe un mensaje a la coordi, pero me dijo que me esperará. Así lo hice, aunque tuve que hacer un gran esfuerzo, porque me sentía mal. Y como eramos solo 7 personas entre mañanas y tardes, el fin de semana solo éramos uno. Entre semana entre tres y uno. Ya que a veces alguno libraba y otro de vacaciones. Pero Aguanté, y como a partir de las 21:00 y hasta las 0:00 no había casi llamadas, aprobeché para estudiar y leer. No sé si dije, que Delly en septiembre del 2024 se apunto a un ciclo superio</text:span><text:span text:style-name="T4">r a distancia (CEED) de Administración. Como yo entonces no estaba en Whatsapp sino cogiendo llamadas, decidí apuntarme a un ciclo de Multiplataforma porque veía que era la única maner de salir de Marktel. Vamos a medio año por curso. Y son dos cursos. Trabajar y estudiar es un agobio. Y encima me pillo el cambio a Schindller en los examenes del primer semestre y el cambio a Vodafone en los segundos. He acabado tan harto que no sé si continuar. Ya que tampoco sé si me gustará trabajar de programador y además, con la IA cada vez se contrata menos. </text:span><text:span text:style-name="T5">Bueno, pues a mitad de abril, se acabo lo de Schindler y me hicieron formación para pasar a averías de Vodafone. Vamos, lo que hacía en Indra. Lo único bueno el horario que es de 14:00 a 22:00 como Delly y al terminar la llevo a casa. Erán dos semanas de formación, pero a la segunda semana no fui, porque tenía los exámenes y me cogi la semana de vacaciones. Pues bueno, en Vodafone estaba muy mal. Hay muchos programas y muchas cosas que se pueden hacer. Pero eso poco a poco iba controlándolo. Lo malo es tener que aguantar a gente cabreada y a gente que no sabe hacer nada y tienes que estar explicando vente veces las cosas. Por lo que lo que no me gustaba es que me paso el rato hablando y escuchando. Y la gente se cabrea si no se soluciona. De momento no me controlaban los tiempos y otras cosas, pero en poco lo iban a hacer. Los compañeros eran amables y los de soporte también. Pero los coordinadores de la tarde eran unos antipaticos, y daban ganas de no preguntarles las dudas. Pues bien, como cada vez me sentía peor, dolor de estomago, ganas de ir al baño, poca hambre, triste, sin ganas de hablar… Pues ayer lunes ya no pudé más. Antes de ir decidi que si veía a Raúl le diria si me pueden arreglar los papeles del paro. </text:span><text:span text:style-name="T6">Pregunté al péndulo, y estaba de acuerdo. Raúl es un ex-compañero de Indra </text:span><text:soft-page-break/><text:span text:style-name="T6">que aquí en Marktel es Supervisor. Algunos de los que estaban en Indra, ahora tienen cargos en Marktel. Pues cuando llegúe al trabajo, justamente bajaba Raúl por las escaleras. Le comente que estaba quemado, que no dormía, que no comía… Así que me dijo que solicitaría que pueda ir con opción de arreglarme los papeles del paro. Pero me dijo que esto podía tardar entre una y dos semanas. Me dio la opción de cogerme la semana de vacaciones que me quedaba, y acepte. Ayer estuvé trabajando dos horas, pero como las vacaciones son de lunes a domingo, no me importo cogerme está semana de vacaciones aun habíendo trabajado dos horas. El lunes que viene también tengo libre porque me quedaba un VF. Y el martes tengo libre porque el finde siguiente trabajo. O sea, que si obtengo los papeles antes del miércoles 3, solo iré a firmar. Pero si no da tiempo, tendré que ir a trabajar. A las 16, tras apagar el PC, e irme, he ido a ver a Delly y se lo he explicado. Ella está contenta por mi porque sabe que lo estaba pasando mal. Pero lo malo es que no la veré todos los días. Mis padres no me han dicho nada en especial. </text:span></text:p>
      <text:p text:style-name="Diario_5f_texto">Se me olvido decir, que como estaba muy mal cuando estuve en Schindler, escribe una carta con todo lo que me pasaba. Por si se la tenía que mostrar a alguien. Pero como luego fue mejor, ya no hice nada. Como ahora otra vez estaba mal, rehice un poco la carta y se la envié a Delly. Ella me dijo que no sabía que me sentía así. En la carta hablaba un poco de todo. Incluso que me pegaban de pequeño. Delly me dijo que se la enviase a mi hermana porque a veces me pregunta como me siento. Así que se la envié a mi hermana y ella me aconsejó hablar con la psicóloga que trata a javi. Así que concerte una cita y el viernes pasado tuvimos la primera sesión. Fue bien, aunque no tuve todavía ningún cambio. Tengo la segunda cita este viernes. Le diré lo del trabajo.</text:p>
      <text:p text:style-name="Diario_5f_texto">Por otra parte, el inodoró del cuarto de baño, hace tiempo que no va bien, y mi madre y hermana decidieron cambiar el cuarto de baño entero. Tenían que haber venido hace semanas, pero finalmente han empezado esta semana. Por lo que el sábado, Delly y yo subimos a la caseta y estamos allí. Pero ella solo el finde. Ya que entre semana se queda en casa de su hermana Antonio.</text:p>
      <text:p text:style-name="Diario_5f_texto">Hoy es martes, estoy tranquilo porque no tengo que ir a trabajar, pero me preocupa el que tengo que encontrar un trabajo y no se que me gusta. Y no me gustaría coger algo que no me guste. Bueno, hasta aquí lo de hoy. A ver si ahora no tardo tanto en escribir.</text:p>
      <text:p text:style-name="Diario_5f_texto"/>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adornments="Negrita itálica"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tab-stops/>
      </style:paragraph-properties>
      <style:text-properties fo:color="#55215b" loext:opacity="100%" style:font-name="Liberation Sans1" fo:font-family="'Liberation Sans'"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iario_5f_fechas" style:display-name="Diario_fechas" style:family="paragraph" style:parent-style-name="Standard" style:auto-update="true">
      <style:text-properties style:font-name="C059" fo:font-family="C059" style:font-style-name="Negrita itálica" style:font-pitch="variable" fo:font-style="italic" fo:font-weight="bold"/>
    </style:style>
    <style:style style:name="Diario_5f_texto" style:display-name="Diario_texto" style:family="paragraph" style:parent-style-name="Standard">
      <style:paragraph-properties fo:text-align="justify" style:justify-single-word="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6T14:25:34.158818781</meta:creation-date>
    <dc:date>2026-05-26T17:12:35.402364495</dc:date>
    <meta:editing-duration>PT48M59S</meta:editing-duration>
    <meta:editing-cycles>11</meta:editing-cycles>
    <meta:generator>LibreOffice/24.2.7.2$Linux_X86_64 LibreOffice_project/420$Build-2</meta:generator>
    <meta:document-statistic meta:table-count="0" meta:image-count="0" meta:object-count="0" meta:page-count="2" meta:paragraph-count="6" meta:word-count="1285" meta:character-count="6776" meta:non-whitespace-character-count="5496"/>
  </office:meta>
</office:document-meta>
</file>